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ATE DATABASE sales_dashboard;</text:p>
      <text:p text:style-name="Normal"/>
      <text:p text:style-name="Normal">USE sales_dashboard;</text:p>
      <text:p text:style-name="Normal"/>
      <text:p text:style-name="Normal">CREATE TABLE Salespersons (</text:p>
      <text:p text:style-name="Normal"><text:s text:c="4"/>salesperson_id INT PRIMARY KEY,</text:p>
      <text:p text:style-name="Normal"><text:s text:c="4"/>salesperson_name VARCHAR(100),</text:p>
      <text:p text:style-name="Normal"><text:s text:c="4"/>region VARCHAR(50)</text:p>
      <text:p text:style-name="Normal">);</text:p>
      <text:p text:style-name="Normal"/>
      <text:p text:style-name="Normal">CREATE TABLE Products (</text:p>
      <text:p text:style-name="Normal"><text:s text:c="4"/>product_id INT PRIMARY KEY,</text:p>
      <text:p text:style-name="Normal"><text:s text:c="4"/>product_name VARCHAR(100),</text:p>
      <text:p text:style-name="Normal"><text:s text:c="4"/>category VARCHAR(50)</text:p>
      <text:p text:style-name="Normal">);</text:p>
      <text:p text:style-name="Normal"/>
      <text:p text:style-name="Normal">CREATE TABLE Sales (</text:p>
      <text:p text:style-name="Normal"><text:s text:c="4"/>sale_id INT PRIMARY KEY,</text:p>
      <text:p text:style-name="Normal"><text:s text:c="4"/>salesperson_id INT,</text:p>
      <text:p text:style-name="Normal"><text:s text:c="4"/>product_id INT,</text:p>
      <text:p text:style-name="Normal"><text:s text:c="4"/>quantity INT,</text:p>
      <text:p text:style-name="Normal"><text:s text:c="4"/>sale_amount DECIMAL(10,2),</text:p>
      <text:p text:style-name="Normal"><text:s text:c="4"/>sale_date DATE,</text:p>
      <text:p text:style-name="Normal"><text:s text:c="4"/>FOREIGN KEY (salesperson_id) REFERENCES Salespersons(salesperson_id),</text:p>
      <text:p text:style-name="Normal"><text:s text:c="4"/>FOREIGN KEY (product_id) REFERENCES Products(product_id)</text:p>
      <text:p text:style-name="Normal">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.Sivathmika Masilamani</meta:initial-creator>
    <dc:creator>M.Sivathmika Masilamani</dc:creator>
    <meta:creation-date>2026-06-30T06:36:00Z</meta:creation-date>
    <dc:date>2026-06-30T06:36:00Z</dc:date>
    <meta:template xlink:href="Normal" xlink:type="simple"/>
    <meta:editing-cycles>1</meta:editing-cycles>
    <meta:editing-duration>PT0S</meta:editing-duration>
    <meta:document-statistic meta:page-count="1" meta:paragraph-count="1" meta:word-count="89" meta:character-count="598" meta:row-count="4" meta:non-whitespace-character-count="510"/>
  </office:meta>
</office:document-meta>
</file>